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400000320A4CBA4F80F30C2DF.png" manifest:media-type="image/png"/>
  <manifest:file-entry manifest:full-path="Pictures/100000010000038400000334B36B29E39B8F8795.png" manifest:media-type="image/png"/>
  <manifest:file-entry manifest:full-path="Pictures/100000010000038400000370BDEDD8627B9B2306.png" manifest:media-type="image/png"/>
  <manifest:file-entry manifest:full-path="Pictures/100000010000038400000320CC65A7B5A8DB495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756in, 0.0654in, 0.069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9626in" svg:y="-0.448in" svg:width="3.639in" svg:height="3.2346in" draw:z-index="0"><draw:image xlink:href="Pictures/100000010000038400000320CC65A7B5A8DB4950.png" xlink:type="simple" xlink:show="embed" xlink:actuate="onLoad" draw:mime-type="image/png"/></draw:frame><text:s/><draw:frame draw:style-name="fr2" draw:name="Image2" text:anchor-type="char" svg:x="3.2244in" svg:y="-0.4563in" svg:width="3.7453in" svg:height="3.3291in" draw:z-index="1"><draw:image xlink:href="Pictures/100000010000038400000320CC65A7B5A8DB495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draw:frame draw:style-name="fr2" draw:name="Image4" text:anchor-type="char" svg:x="1.098in" svg:y="0.1807in" svg:width="4.1228in" svg:height="4.0311in" draw:z-index="3"><draw:image xlink:href="Pictures/100000010000038400000370BDEDD8627B9B23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5" text:anchor-type="char" svg:x="1.122in" svg:y="-0.0528in" svg:width="4.9508in" svg:height="4.511in" draw:z-index="4"><draw:image xlink:href="Pictures/100000010000038400000320A4CBA4F80F30C2DF.png" xlink:type="simple" xlink:show="embed" xlink:actuate="onLoad" draw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.689in" svg:y="0.6154in" svg:width="4.9827in" svg:height="4.5402in" draw:z-index="2"><draw:image xlink:href="Pictures/100000010000038400000334B36B29E39B8F87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7.2$Linux_X86_64 LibreOffice_project/40$Build-2</meta:generator>
    <dc:date>2026-05-20T04:36:52.801333456</dc:date>
    <meta:editing-duration>PT14M51S</meta:editing-duration>
    <meta:editing-cycles>4</meta:editing-cycles>
    <meta:document-statistic meta:table-count="0" meta:image-count="5" meta:object-count="0" meta:page-count="2" meta:paragraph-count="3" meta:word-count="0" meta:character-count="3" meta:non-whitespace-character-count="0"/>
  </office:meta>
</office:document-meta>
</file>